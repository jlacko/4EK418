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71581F94C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4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6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7" style:family="presentation" style:parent-style-name="Title_2c__20_Content_5f_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9" style:family="presentation" style:parent-style-name="Bottom_20_Red-title">
      <style:graphic-properties fo:min-height="3.505cm" loext:decorative="false"/>
      <style:paragraph-properties style:writing-mode="lr-tb"/>
    </style:style>
    <style:style style:name="pr10" style:family="presentation" style:parent-style-name="Bottom_20_Red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left" style:font-independent-line-spacing="true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666cm" fo:margin-bottom="0cm" fo:text-indent="0cm"/>
    </style:style>
    <style:style style:name="P4" style:family="paragraph">
      <style:text-properties fo:font-size="40pt" style:font-size-asian="26pt" style:font-size-complex="26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text-properties fo:color="#ffffff" loext:opacity="100%" style:font-name="Roboto1" fo:font-size="42.7000007629395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color="#424242" loext:opacity="100%" style:font-name="Roboto1" fo:font-size="42.7000007629395pt" style:letter-kerning="true" style:font-name-asian="Noto Sans CJK SC" style:font-size-asian="32pt" style:font-name-complex="Lohit Devanagari" style:font-size-complex="32pt"/>
    </style:style>
    <style:style style:name="T2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style:style style:name="T3" style:family="text">
      <style:text-properties fo:font-size="40pt" style:font-size-asian="26pt" style:font-size-complex="26pt"/>
    </style:style>
    <style:style style:name="T4" style:family="text">
      <style:text-properties style:font-name="Fira Code" fo:font-size="40pt" fo:background-color="#eeeeee" style:font-size-asian="26pt" style:font-size-complex="26pt"/>
    </style:style>
    <style:style style:name="T5" style:family="text">
      <style:text-properties style:font-name="Roboto" fo:font-size="40pt" fo:font-style="italic" style:font-name-asian="Roboto" style:font-size-asian="26pt" style:font-style-asian="italic" style:font-name-complex="Roboto" style:font-size-complex="26pt" style:font-style-complex="italic"/>
    </style:style>
    <style:style style:name="T6" style:family="text">
      <style:text-properties style:font-name="Roboto" fo:font-size="40pt" fo:font-style="normal" style:font-name-asian="Roboto" style:font-size-asian="26pt" style:font-style-asian="normal" style:font-name-complex="Roboto" style:font-size-complex="26pt" style:font-style-complex="normal"/>
    </style:style>
    <style:style style:name="T7" style:family="text">
      <style:text-properties fo:color="#ffffff" loext:opacity="100%" style:font-name="Roboto1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4" draw:layer="layout" svg:width="25.06cm" svg:height="12.687cm" svg:x="1.397cm" svg:y="5.333cm" presentation:class="outline" presentation:user-transformed="true">
          <draw:text-box>
            <text:list text:style-name="L2">
              <text:list-item>
                <text:p xml:id="id1" text:id="id1" text:style-name="P3"><text:span text:style-name="T1">Optimalizace distribuce</text:span></text:p>
              </text:list-item>
              <text:list-item>
                <text:p xml:id="id2" text:id="id2" text:style-name="P3"><text:span text:style-name="T1">Hledání závislosti (regrese)</text:span></text:p>
              </text:list-item>
              <text:list-item>
                <text:p xml:id="id3" text:id="id3" text:style-name="P3"><text:span text:style-name="T1">Zvláštní pozornost – rezidua / rozdíl mezi modelem a skutečností</text:span></text:p>
              </text:list-item>
              <text:list-item>
                <text:p xml:id="id4" text:id="id4" text:style-name="P3"><text:span text:style-name="T1">Regrese = standardní erkové techniky – </text:span><text:span text:style-name="T2">stats::lm()</text:span><text:span text:style-name="T1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 presentation:user-transformed="true">
          <draw:text-box>
            <text:p>Sofistikovanější techniky</text:p>
          </draw:text-box>
        </draw:frame>
        <draw:frame presentation:style-name="pr6" draw:text-style-name="P4" draw:layer="layout" svg:width="25.803cm" svg:height="12.953cm" svg:x="1.397cm" svg:y="5.333cm" presentation:class="outline" presentation:user-transformed="true">
          <draw:text-box>
            <text:list text:style-name="L2">
              <text:list-item>
                <text:p xml:id="id5" text:id="id5"><text:span text:style-name="T3">Pro čítací data se hodí Poisson </text:span><text:span text:style-name="T4">stats::glm(family="poisson")</text:span></text:p>
              </text:list-item>
              <text:list-item>
                <text:p xml:id="id6" text:id="id6"><text:span text:style-name="T3">Poissonova distribuce má jediný </text:span><text:span text:style-name="T3">parametr </text:span><text:span text:style-name="T5">λ </text:span><text:span text:style-name="T6">(což není mnoho)</text:span></text:p>
              </text:list-item>
              <text:list-item>
                <text:p xml:id="id7" text:id="id7"><text:span text:style-name="T6">Negative Binomial a Zero Inflated modely </text:span><text:span text:style-name="T6">mohou pomoci</text:span></text:p>
              </text:list-item>
              <text:list-item>
                <text:p xml:id="id8" text:id="id8"><text:span text:style-name="T6">Srovnání lm a glm přes </text:span><text:span text:style-name="T4">AIC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6" draw:layer="layout" svg:width="25.06cm" svg:height="12.953cm" svg:x="1.397cm" svg:y="5.333cm" presentation:class="outline">
          <draw:text-box>
            <text:list text:style-name="L2">
              <text:list-item>
                <text:p xml:id="id9" text:id="id9">první krok: společný jmenovatel</text:p>
                <text:list>
                  <text:list-item>
                    <text:p xml:id="id10" text:id="id10">dobrý start: mřížka (odstíní rozdíly v ploše oblastí zájmu)</text:p>
                  </text:list-item>
                  <text:list-item>
                    <text:p xml:id="id11" text:id="id11">administrativní polygony problematické</text:p>
                  </text:list-item>
                  <text:list-item>
                    <text:p xml:id="id12" text:id="id12">pozor na populaci!</text:p>
                  </text:list-item>
                </text:list>
              </text:list-item>
              <text:list-item>
                <text:p xml:id="id13" text:id="id13">druhý krok: klasická statistika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6" draw:layer="layout" svg:width="25.06cm" svg:height="12.953cm" svg:x="1.397cm" svg:y="5.333cm" presentation:class="outline">
          <draw:text-box>
            <text:list text:style-name="L2">
              <text:list-item>
                <text:p xml:id="id14" text:id="id14">Modelový příklad: optimalizace hospod v Praze</text:p>
              </text:list-item>
              <text:list-item>
                <text:p xml:id="id15" text:id="id15">Faktory</text:p>
                <text:list>
                  <text:list-item>
                    <text:p xml:id="id16" text:id="id16">Počet obyvatel městské části</text:p>
                  </text:list-item>
                  <text:list-item>
                    <text:p xml:id="id17" text:id="id17">Počet hotelových lůžek</text:p>
                  </text:list-item>
                  <text:list-item>
                    <text:p xml:id="id18" text:id="id18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6" draw:layer="layout" svg:width="25.198cm" svg:height="2.16cm" svg:x="1.399cm" svg:y="14.931cm" presentation:class="subtitle" presentation:user-transformed="true">
          <draw:text-box>
            <text:p text:style-name="P5"><text:span text:style-name="T7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2T1">
        <office:forms form:automatic-focus="false" form:apply-design-mode="false"/>
        <draw:frame presentation:style-name="pr9" draw:layer="layout" svg:width="25.198cm" svg:height="3.505cm" svg:x="1.199cm" svg:y="8.76cm" presentation:class="title">
          <draw:text-box>
            <text:p>Díky !</text:p>
          </draw:text-box>
        </draw:frame>
        <draw:frame draw:style-name="gr3" draw:text-style-name="P8" xml:id="id19" draw:id="id19" draw:layer="layout" svg:width="33.817cm" svg:height="21.135cm" svg:x="-2.51cm" svg:y="-0.099cm">
          <draw:image xlink:href="Pictures/10000000000003E800000271581F94C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1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1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1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left"/>
      <style:text-properties style:font-name="Roboto1" fo:font-size="24pt"/>
    </style:style>
    <style:style style:name="MP6" style:family="paragraph">
      <loext:graphic-properties draw:fill="solid" draw:fill-color="#f03838"/>
      <style:paragraph-properties fo:text-align="left"/>
      <style:text-properties fo:color="#ffffff" loext:opacity="100%" style:font-name="Roboto1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1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1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1" fo:font-size="14pt" style:font-size-asian="14pt" style:font-size-complex="14pt"/>
    </style:style>
    <style:style style:name="MP13" style:family="paragraph">
      <style:paragraph-properties fo:text-align="right" style:writing-mode="lr-tb"/>
      <style:text-properties style:font-name="Roboto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right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116</meta:editing-cycles>
    <dc:title>JLA prezka</dc:title>
    <meta:editing-duration>P2DT12H22M52S</meta:editing-duration>
    <meta:generator>LibreOffice/26.2.2.2$Linux_X86_64 LibreOffice_project/620$Build-2</meta:generator>
    <meta:initial-creator>Jindra Lacko</meta:initial-creator>
    <dc:date>2026-05-07T08:49:11.652040055</dc:date>
    <dc:creator>Jindra Lacko</dc:creator>
    <meta:print-date>2026-05-06T23:07:05.813455990</meta:print-date>
    <meta:printed-by>PDF files: Jindra Lacko</meta:printed-by>
    <meta:document-statistic meta:object-count="89"/>
  </office:meta>
</office:document-meta>
</file>